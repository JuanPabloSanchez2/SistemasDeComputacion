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Pictures/10000001000000F1000000CB2DF0F7C1.png" manifest:media-type="image/png"/>
  <manifest:file-entry manifest:full-path="Pictures/1000000100000319000001D923A1DA9A.png" manifest:media-type="image/png"/>
  <manifest:file-entry manifest:full-path="Pictures/100000010000032300000072946F2E8C.png" manifest:media-type="image/png"/>
  <manifest:file-entry manifest:full-path="Pictures/1000000100000101000000CBB29D80B3.png" manifest:media-type="image/png"/>
  <manifest:file-entry manifest:full-path="Pictures/10000001000002C800000125532F032A.png" manifest:media-type="image/png"/>
  <manifest:file-entry manifest:full-path="Pictures/100000010000035F000001613878C9A1.png" manifest:media-type="image/png"/>
  <manifest:file-entry manifest:full-path="Pictures/1000000100000333000000755E2BDDD6.png" manifest:media-type="image/png"/>
  <manifest:file-entry manifest:full-path="Pictures/10000001000002CD000000649CE3AF84.png" manifest:media-type="image/png"/>
  <manifest:file-entry manifest:full-path="Pictures/100000010000007F000000A7C199522D.png" manifest:media-type="image/png"/>
  <manifest:file-entry manifest:full-path="Thumbnails/thumbnail.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a1" style:family="table">
      <style:table-properties style:width="15.97cm" fo:margin-left="0cm" fo:margin-top="0cm" fo:margin-bottom="0cm" table:align="left" style:writing-mode="page"/>
    </style:style>
    <style:style style:name="Tabla1.A" style:family="table-column">
      <style:table-column-properties style:column-width="15.97cm"/>
    </style:style>
    <style:style style:name="Tabla1.1" style:family="table-row">
      <style:table-row-properties style:min-row-height="0.596cm" fo:keep-together="auto"/>
    </style:style>
    <style:style style:name="Tabla1.A1" style:family="table-cell">
      <style:table-cell-properties fo:padding-left="0.191cm" fo:padding-right="0.191cm" fo:padding-top="0cm" fo:padding-bottom="0cm" fo:border="none"/>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7.49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85ece"/>
    </style:style>
    <style:style style:name="P4" style:family="paragraph" style:parent-style-name="Standard">
      <style:paragraph-properties fo:text-align="justify" style:justify-single-word="false"/>
      <style:text-properties officeooo:paragraph-rsid="002cbf01"/>
    </style:style>
    <style:style style:name="P5" style:family="paragraph" style:parent-style-name="Standard">
      <style:paragraph-properties fo:text-align="justify" style:justify-single-word="false"/>
      <style:text-properties officeooo:rsid="001c8f7f" officeooo:paragraph-rsid="001c8f7f"/>
    </style:style>
    <style:style style:name="P6" style:family="paragraph" style:parent-style-name="Standard">
      <style:paragraph-properties fo:text-align="justify" style:justify-single-word="false"/>
      <style:text-properties officeooo:rsid="001e16df" officeooo:paragraph-rsid="001e16df"/>
    </style:style>
    <style:style style:name="P7" style:family="paragraph" style:parent-style-name="Standard">
      <style:paragraph-properties fo:margin-top="0cm" fo:margin-bottom="0cm" style:contextual-spacing="false" fo:text-align="justify" style:justify-single-word="false" fo:orphans="2" fo:widows="2"/>
      <style:text-properties fo:font-size="11pt" officeooo:rsid="0020071b" officeooo:paragraph-rsid="0020071b" style:font-size-asian="11pt" style:font-size-complex="11pt" style:language-complex="ar" style:country-complex="SA"/>
    </style:style>
    <style:style style:name="P8" style:family="paragraph" style:parent-style-name="Standard">
      <style:paragraph-properties fo:margin-top="0cm" fo:margin-bottom="0cm" style:contextual-spacing="false" fo:text-align="center" style:justify-single-word="false" fo:orphans="2" fo:widows="2"/>
      <style:text-properties fo:font-size="11pt" style:font-size-asian="11pt" style:font-size-complex="11pt" style:language-complex="ar" style:country-complex="SA"/>
    </style:style>
    <style:style style:name="P9" style:family="paragraph" style:parent-style-name="Standard">
      <style:paragraph-properties fo:margin-top="0cm" fo:margin-bottom="0cm" style:contextual-spacing="false" fo:text-align="justify" style:justify-single-word="false" fo:orphans="2" fo:widows="2"/>
      <style:text-properties fo:font-size="11pt" officeooo:rsid="0021bef5" officeooo:paragraph-rsid="0021bef5" style:font-size-asian="11pt" style:font-size-complex="11pt" style:language-complex="ar" style:country-complex="SA"/>
    </style:style>
    <style:style style:name="P10" style:family="paragraph" style:parent-style-name="Standard">
      <style:paragraph-properties fo:margin-top="0cm" fo:margin-bottom="0cm" style:contextual-spacing="false" fo:text-align="justify" style:justify-single-word="false" fo:orphans="2" fo:widows="2"/>
      <style:text-properties fo:font-size="11pt" officeooo:rsid="0023a4b3" officeooo:paragraph-rsid="0023a4b3" style:font-size-asian="11pt" style:font-size-complex="11pt" style:language-complex="ar" style:country-complex="SA"/>
    </style:style>
    <style:style style:name="P11" style:family="paragraph" style:parent-style-name="Standard">
      <style:paragraph-properties fo:text-align="justify" style:justify-single-word="false"/>
      <style:text-properties officeooo:rsid="0020071b" officeooo:paragraph-rsid="0020071b"/>
    </style:style>
    <style:style style:name="P12" style:family="paragraph" style:parent-style-name="Standard">
      <style:paragraph-properties fo:text-align="justify" style:justify-single-word="false"/>
      <style:text-properties officeooo:rsid="0026bd78" officeooo:paragraph-rsid="0026bd78"/>
    </style:style>
    <style:style style:name="P13" style:family="paragraph" style:parent-style-name="Standard">
      <style:paragraph-properties fo:text-align="justify" style:justify-single-word="false"/>
      <style:text-properties officeooo:rsid="00279ade" officeooo:paragraph-rsid="00279ade"/>
    </style:style>
    <style:style style:name="P14" style:family="paragraph" style:parent-style-name="Standard">
      <style:paragraph-properties fo:text-align="justify" style:justify-single-word="false"/>
      <style:text-properties officeooo:rsid="00285ece" officeooo:paragraph-rsid="00285ece"/>
    </style:style>
    <style:style style:name="P15" style:family="paragraph" style:parent-style-name="Standard">
      <style:paragraph-properties fo:text-align="start" style:justify-single-word="false"/>
    </style:style>
    <style:style style:name="P16" style:family="paragraph" style:parent-style-name="Standard">
      <style:paragraph-properties fo:text-align="justify" style:justify-single-word="false"/>
      <style:text-properties officeooo:rsid="002a1545" officeooo:paragraph-rsid="002a1545"/>
    </style:style>
    <style:style style:name="P17" style:family="paragraph" style:parent-style-name="Standard">
      <style:paragraph-properties fo:text-align="justify" style:justify-single-word="false"/>
      <style:text-properties officeooo:rsid="002cbf01" officeooo:paragraph-rsid="002cbf01"/>
    </style:style>
    <style:style style:name="P18" style:family="paragraph" style:parent-style-name="Standard">
      <style:paragraph-properties fo:text-align="start" style:justify-single-word="false"/>
      <style:text-properties officeooo:rsid="002cbf01" officeooo:paragraph-rsid="002cbf01"/>
    </style:style>
    <style:style style:name="P19" style:family="paragraph" style:parent-style-name="Standard">
      <style:paragraph-properties fo:margin-top="0.423cm" fo:margin-bottom="0.282cm" style:contextual-spacing="false" fo:line-height="106%" fo:text-align="center" style:justify-single-word="false"/>
    </style:style>
    <style:style style:name="P20" style:family="paragraph" style:parent-style-name="Standard">
      <style:paragraph-properties fo:margin-top="0cm" fo:margin-bottom="0.353cm" style:contextual-spacing="false"/>
      <style:text-properties style:font-name="Calibri" fo:font-size="12pt" fo:font-weight="bold" style:font-name-asian="Calibri1" style:font-size-asian="12pt" style:font-weight-asian="bold" style:font-name-complex="Calibri1" style:font-size-complex="12pt"/>
    </style:style>
    <style:style style:name="P21" style:family="paragraph" style:parent-style-name="Standard">
      <style:paragraph-properties fo:margin-top="0cm" fo:margin-bottom="0.353cm" style:contextual-spacing="false"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22" style:family="paragraph" style:parent-style-name="Standard">
      <style:paragraph-properties fo:margin-top="0cm" fo:margin-bottom="0.353cm" style:contextual-spacing="false" fo:text-align="center" style:justify-single-word="false"/>
      <style:text-properties style:font-name="Calibri" fo:font-size="12pt" style:font-name-asian="Calibri1" style:font-size-asian="12pt" style:font-name-complex="Calibri1" style:font-size-complex="12pt" style:font-weight-complex="bold"/>
    </style:style>
    <style:style style:name="P23" style:family="paragraph" style:parent-style-name="Standard">
      <style:paragraph-properties fo:margin-top="0cm" fo:margin-bottom="0.353cm" style:contextual-spacing="false"/>
      <style:text-properties style:font-name="Calibri" style:font-name-asian="Calibri1" style:font-name-complex="Calibri1"/>
    </style:style>
    <style:style style:name="P24" style:family="paragraph" style:parent-style-name="Standard">
      <style:paragraph-properties fo:line-height="100%"/>
      <style:text-properties style:font-name="Calibri" style:font-name-asian="Calibri1" style:font-name-complex="Calibri1"/>
    </style:style>
    <style:style style:name="P25" style:family="paragraph" style:parent-style-name="Standard">
      <style:paragraph-properties fo:margin-top="0cm" fo:margin-bottom="0.353cm" style:contextual-spacing="false" fo:text-align="center" style:justify-single-word="false"/>
    </style:style>
    <style:style style:name="P26" style:family="paragraph" style:parent-style-name="Standard">
      <style:paragraph-properties fo:text-align="justify" style:justify-single-word="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justify" style:justify-single-word="false"/>
      <style:text-properties fo:font-weight="bold" style:font-weight-asian="bold" style:font-weight-complex="bold"/>
    </style:style>
    <style:style style:name="P29" style:family="paragraph" style:parent-style-name="Standard">
      <style:paragraph-properties fo:text-align="justify" style:justify-single-word="false"/>
      <style:text-properties officeooo:rsid="002cbf01" officeooo:paragraph-rsid="002cbf01"/>
    </style:style>
    <style:style style:name="T1" style:family="text">
      <style:text-properties style:font-name="Calibri" fo:font-size="18pt" fo:font-weight="bold" style:font-name-asian="Calibri1" style:font-size-asian="18pt" style:font-weight-asian="bold" style:font-name-complex="Calibri1" style:font-size-complex="18pt"/>
    </style:style>
    <style:style style:name="T2" style:family="text">
      <style:text-properties style:font-name="Calibri" fo:font-size="14pt" fo:font-weight="bold" style:font-name-asian="Calibri1" style:font-size-asian="14pt" style:font-weight-asian="bold" style:font-name-complex="Calibri1" style:font-size-complex="14pt"/>
    </style:style>
    <style:style style:name="T3" style:family="text">
      <style:text-properties style:font-name="Calibri" fo:font-size="12pt" fo:font-weight="bold" style:font-name-asian="Calibri1" style:font-size-asian="12pt" style:font-weight-asian="bold" style:font-name-complex="Calibri1" style:font-size-complex="12pt"/>
    </style:style>
    <style:style style:name="T4" style:family="text">
      <style:text-properties style:font-name="Calibri" fo:font-size="12pt" style:font-name-asian="Calibri1" style:font-size-asian="12pt" style:font-name-complex="Calibri1" style:font-size-complex="12pt"/>
    </style:style>
    <style:style style:name="T5" style:family="text">
      <style:text-properties style:font-name="Calibri" fo:font-size="12pt" style:font-name-asian="Calibri1" style:font-size-asian="12pt" style:font-name-complex="Calibri1" style:font-size-complex="12pt" style:font-weight-complex="bold"/>
    </style:style>
    <style:style style:name="T6" style:family="text">
      <style:text-properties style:font-name="Calibri" style:font-name-asian="Calibri1" style:font-name-complex="Calibri1"/>
    </style:style>
    <style:style style:name="T7" style:family="text">
      <style:text-properties fo:font-weight="bold" style:font-weight-asian="bold" style:font-weight-complex="bold"/>
    </style:style>
    <style:style style:name="T8" style:family="text">
      <style:text-properties fo:language="es" fo:country="AR"/>
    </style:style>
    <style:style style:name="T9" style:family="text">
      <style:text-properties fo:font-style="italic" style:font-style-asian="italic" style:font-style-complex="italic"/>
    </style:style>
    <style:style style:name="T10" style:family="text">
      <style:text-properties officeooo:rsid="001c8f7f"/>
    </style:style>
    <style:style style:name="T11" style:family="text">
      <style:text-properties officeooo:rsid="0023a4b3"/>
    </style:style>
    <style:style style:name="T12" style:family="text">
      <style:text-properties officeooo:rsid="0024f2de"/>
    </style:style>
    <style:style style:name="T13" style:family="text">
      <style:text-properties officeooo:rsid="00263685"/>
    </style:style>
    <style:style style:name="T14" style:family="text">
      <style:text-properties officeooo:rsid="00279ade"/>
    </style:style>
    <style:style style:name="T15" style:family="text">
      <style:text-properties officeooo:rsid="00285ece"/>
    </style:style>
    <style:style style:name="T16" style:family="text">
      <style:text-properties fo:language="es" fo:country="ES"/>
    </style:style>
    <style:style style:name="T17" style:family="text">
      <style:text-properties fo:language="es" fo:country="ES" officeooo:rsid="00285ece"/>
    </style:style>
    <style:style style:name="T18" style:family="text">
      <style:text-properties officeooo:rsid="002a1545"/>
    </style:style>
    <style:style style:name="T19" style:family="text">
      <style:text-properties officeooo:rsid="002b3972"/>
    </style:style>
    <style:style style:name="T20" style:family="text">
      <style:text-properties officeooo:rsid="002cbf01"/>
    </style:style>
    <style:style style:name="T21" style:family="text">
      <style:text-properties fo:font-style="normal" style:font-style-asian="normal" style:font-style-complex="normal"/>
    </style:style>
    <style:style style:name="T22" style:family="text">
      <style:text-properties officeooo:rsid="002fe0bf"/>
    </style:style>
    <style:style style:name="fr1" style:family="graphic" style:parent-style-name="Graphics">
      <style:graphic-properties style:vertical-pos="from-top" style:vertical-rel="paragraph" style:horizontal-pos="from-left" style:horizontal-rel="paragraph" style:mirror="none" fo:clip="rect(0cm, 0.296cm, 0.17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Formula">
      <style:graphic-properties style:vertical-pos="from-top" style:vertical-rel="paragraph" style:horizontal-pos="from-left" style:horizontal-rel="paragraph"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8" style:family="graphic" style:parent-style-name="Formula">
      <style:graphic-properties style:vertical-pos="from-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5" draw:name="image1.png" text:anchor-type="char" svg:x="6.055cm" svg:y="0.318cm" svg:width="3.798cm" svg:height="4.994cm" draw:z-index="0"><draw:image xlink:href="Pictures/100000010000007F000000A7C199522D.png" xlink:type="simple" xlink:show="embed" xlink:actuate="onLoad" draw:mime-type="image/png"/></draw:frame></text:p>
      <text:p text:style-name="P19" loext:marker-style-name="T1"><text:span text:style-name="T1">UNIVERSIDAD NACIONAL DE CÓRDOBA</text:span><text:span text:style-name="T1"/></text:p>
      <text:p text:style-name="P19" loext:marker-style-name="T2"><text:span text:style-name="T2">FACULTAD DE CIENCIAS EXACTAS, FÍSICAS Y NATURALES</text:span><text:span text:style-name="T2"/></text:p>
      <text:p text:style-name="P19" loext:marker-style-name="T2"><text:span text:style-name="T2">CÁTEDRA DE SISTEMAS DE COMPUTACIÓN</text:span><text:span text:style-name="T2"/></text:p>
      <text:p text:style-name="P20" loext:marker-style-name="T3"/>
      <text:p text:style-name="P25" loext:marker-style-name="T4"><text:span text:style-name="T4">Trabajo Práctico Nº 1:</text:span><text:span text:style-name="T4"/></text:p>
      <text:p text:style-name="P20" loext:marker-style-name="T3"/>
      <text:p text:style-name="P21" loext:marker-style-name="T3"/>
      <text:p text:style-name="P25" loext:marker-style-name="T3"><text:span text:style-name="T3">Nombre del grupo:</text:span><text:span text:style-name="T3"/></text:p>
      <text:p text:style-name="P25" loext:marker-style-name="T5"><text:span text:style-name="T5">INGENIA</text:span><text:span text:style-name="T5"/></text:p>
      <text:p text:style-name="P22" loext:marker-style-name="T5"/>
      <text:p text:style-name="P25" loext:marker-style-name="T3"><text:span text:style-name="T3">Integrantes:</text:span><text:span text:style-name="T3"/></text:p>
      <text:p text:style-name="P25" loext:marker-style-name="T4"><text:span text:style-name="T4">Juan Pablo Sanchez Busso - 41888792</text:span><text:span text:style-name="T4"/></text:p>
      <text:p text:style-name="P23" loext:marker-style-name="T6"/>
      <table:table table:name="Tabla1" table:style-name="Tabla1">
        <table:table-column table:style-name="Tabla1.A"/>
        <table:table-row table:style-name="Tabla1.1">
          <table:table-cell table:style-name="Tabla1.A1" office:value-type="string">
            <text:p text:style-name="P24" loext:marker-style-name="T6"/>
          </table:table-cell>
        </table:table-row>
      </table:table>
      <text:p text:style-name="P25" loext:marker-style-name="T6"><text:span text:style-name="T6">31/03/2025</text:span><text:span text:style-name="T6"/></text:p>
      <text:p text:style-name="P1"/>
      <text:p text:style-name="P1"/>
      <text:p text:style-name="P1"/>
      <text:p text:style-name="P1"/>
      <text:p text:style-name="P1"/>
      <text:p text:style-name="P1"><text:soft-page-break/></text:p>
      <text:p text:style-name="P1"/>
      <text:p text:style-name="P1"/>
      <text:p text:style-name="P2" loext:marker-style-name="T7"><text:span text:style-name="T7">Objetivos:</text:span><text:span text:style-name="T7"/></text:p>
      <text:p text:style-name="P15">Armar una lista de benchmarks, ¿cuáles les serían más útiles a cada uno? ¿Cuáles podrían llegar a medir mejor las tareas que ustedes realizan a diario? <text:line-break/>Pensar en las tareas que cada uno realiza a diario y escribir en una tabla de dos entradas las tareas y que benchmark la representa mejor.<text:line-break/></text:p>
      <text:p text:style-name="P15">¿Cual es el rendimiento de estos procesadores para compilar el kernel de linux? <text:line-break/>Intel Core i5-13600K <text:span text:style-name="T18">y </text:span>AMD Ryzen 9590X <text:span text:style-name="T18">1</text:span>2-Core<text:line-break/>Cual es la aceleración cuando usamos un AMD Ryzen 9 7950X 16-Core</text:p>
      <text:p text:style-name="P1"/>
      <text:p text:style-name="P1"/>
      <text:p text:style-name="P2" loext:marker-style-name="T8"><text:span text:style-name="T8">Conseguir un esp32 o cualquier procesador al que se le pueda cambiar la frecuencia.</text:span><text:span text:style-name="T8"/></text:p>
      <text:p text:style-name="P2" loext:marker-style-name="T8"><text:span text:style-name="T8">Ejecutar un código que demore alrededor de 10 segundos. Puede ser un bucle for con sumas de enteros por un lado y otro con suma de floats por otro lado.</text:span><text:span text:style-name="T8"/></text:p>
      <text:p text:style-name="P2" loext:marker-style-name="T8"><text:span text:style-name="T8">¿Qué sucede con el tiempo del programa al duplicar (variar) la frecuencia? </text:span><text:span text:style-name="T8"/></text:p>
      <text:p text:style-name="Standard"/>
      <text:p text:style-name="P27" loext:marker-style-name="T7"/>
      <text:p text:style-name="P27" loext:marker-style-name="T7"/>
      <text:p text:style-name="Standard" loext:marker-style-name="T7"><text:span text:style-name="T7">Desarrollo:</text:span><text:span text:style-name="T7"/></text:p>
      <text:p text:style-name="P28" loext:marker-style-name="T7"/>
      <text:p text:style-name="P2">Los benchmarks en este contexto se utilizan para medir el rendimiento de alguno de los componentes de la PC, como la capacidad del procesador para realizar alguna tarea, las imágenes por segundo que puede generar la placa de video, o la cantidad de información que puede manejar nuestra unidad de almacenamiento. Los benchmarks nos pueden dar información muy valiosa, por ejemplo, para comparar distintos componentes si estamos pensando en mejorar el equipo, o para evaluar su costo-calidad. </text:p>
      <text:p text:style-name="P2"/>
      <text:p text:style-name="P2">Hay que tener en consideración que debido a que existen una gran cantidad de benchmarks enfocados en aspectos específicos, debemos elegir el adecuado según que nos interese medir. Por lo tanto, si definimos cuales son las tareas que realizamos habitualmente, reducimos el espectro de benchmarks que nos serán de utilidad y que podemos realizar.</text:p>
      <text:p text:style-name="P2"/>
      <text:p text:style-name="P11">Algunos ejemplos de benchmarks son CrystalDiskMark, para los dispositivos de almacenamiento SSDs o HDDs, 3DMark para la tarjeta gráfica, Cinebench para el CPU, o PassMark para medir la latencia de nuestras memorias RAM.</text:p>
      <text:p text:style-name="P2"/>
      <table:table table:name="Tabla2" table:style-name="Tabla2">
        <table:table-column table:style-name="Tabla2.A" table:number-columns-repeated="2"/>
        <table:table-row table:style-name="Tabla2.1">
          <table:table-cell table:style-name="Tabla2.A1" office:value-type="string">
            <text:p text:style-name="P8">Tarea realizada</text:p>
          </table:table-cell>
          <table:table-cell table:style-name="Tabla2.A1" office:value-type="string">
            <text:p text:style-name="P8">Benchmark pertinente</text:p>
          </table:table-cell>
        </table:table-row>
        <table:table-row table:style-name="Tabla2.1">
          <table:table-cell table:style-name="Tabla2.A1" office:value-type="string">
            <text:p text:style-name="P7">Renderizado de video</text:p>
          </table:table-cell>
          <table:table-cell table:style-name="Tabla2.A1" office:value-type="string">
            <text:p text:style-name="P7">Cinebench</text:p>
          </table:table-cell>
        </table:table-row>
        <table:table-row table:style-name="Tabla2.1">
          <table:table-cell table:style-name="Tabla2.A1" office:value-type="string">
            <text:p text:style-name="P7">Jugar videojuegos</text:p>
          </table:table-cell>
          <table:table-cell table:style-name="Tabla2.A1" office:value-type="string">
            <text:p text:style-name="P7">3DMark o Heavens</text:p>
          </table:table-cell>
        </table:table-row>
        <table:table-row table:style-name="Tabla2.1">
          <table:table-cell table:style-name="Tabla2.A1" office:value-type="string">
            <text:p text:style-name="P7">Diseño en 3D</text:p>
          </table:table-cell>
          <table:table-cell table:style-name="Tabla2.A1" office:value-type="string">
            <text:p text:style-name="P9">Solidworks Performance <text:span text:style-name="T11">Test</text:span></text:p>
          </table:table-cell>
        </table:table-row>
        <table:table-row table:style-name="Tabla2.1">
          <table:table-cell table:style-name="Tabla2.A1" office:value-type="string">
            <text:p text:style-name="P10">Descargar / Subir archivos</text:p>
          </table:table-cell>
          <table:table-cell table:style-name="Tabla2.A1" office:value-type="string">
            <text:p text:style-name="P10">PassMark Network Benchmark</text:p>
          </table:table-cell>
        </table:table-row>
      </table:table>
      <text:p text:style-name="P2"/>
      <text:p text:style-name="P2"/>
      <text:p text:style-name="P2"><text:soft-page-break/>Un benchmark para <text:span text:style-name="T19">evaluar</text:span> la capacidad de procesamiento de la CPU, es medir cuanto tarda en crearse la <text:span text:style-name="T9">build</text:span> del kernel de Linux en una configuración<text:span text:style-name="T9"> default, </text:span><text:s/>en este caso la compilación 6.8. Los valores de estos benchmarks son cargados <text:span text:style-name="T9">online</text:span> por los diferentes usuarios para comparar resultados.</text:p>
      <text:p text:style-name="P2">El primer procesador que observaremos será el Intel i5-13600K que es un procesador de 14 núcleos y 20 hilos con una frecuencia de clock de <draw:frame draw:style-name="fr7" draw:name="Objeto1" text:anchor-type="as-char" svg:width="1.365cm" svg:height="0.471cm" draw:z-index="1"><draw:object xlink:href="./Object 1" xlink:type="simple" xlink:show="embed" xlink:actuate="onLoad"/><draw:image xlink:href="./ObjectReplacements/Object 1" xlink:type="simple" xlink:show="embed" xlink:actuate="onLoad"/></draw:frame>, el tiempo de compilación reportado es <draw:frame draw:style-name="fr7" draw:name="Objeto2" text:anchor-type="as-char" svg:width="2.26cm" svg:height="0.534cm" draw:z-index="2"><draw:object xlink:href="./Object 2" xlink:type="simple" xlink:show="embed" xlink:actuate="onLoad"/><draw:image xlink:href="./ObjectReplacements/Object 2" xlink:type="simple" xlink:show="embed" xlink:actuate="onLoad"/></draw:frame>. El segundo procesador a analizar es el AMD Ryzen 9 5900X, el cual cuenta con 12 núcleos y 24 hilos con una frecuencia de trabajo de <draw:frame draw:style-name="fr7" draw:name="Objeto3" text:anchor-type="as-char" svg:width="1.379cm" svg:height="0.471cm" draw:z-index="3"><draw:object xlink:href="./Object 3" xlink:type="simple" xlink:show="embed" xlink:actuate="onLoad"/><draw:image xlink:href="./ObjectReplacements/Object 3" xlink:type="simple" xlink:show="embed" xlink:actuate="onLoad"/></draw:frame>, el tiempo de compilación <draw:frame draw:style-name="fr7" draw:name="Objeto4" text:anchor-type="as-char" svg:width="2.274cm" svg:height="0.534cm" draw:z-index="4"><draw:object xlink:href="./Object 4" xlink:type="simple" xlink:show="embed" xlink:actuate="onLoad"/><draw:image xlink:href="./ObjectReplacements/Object 4" xlink:type="simple" xlink:show="embed" xlink:actuate="onLoad"/></draw:frame>.</text:p>
      <text:p text:style-name="P2"/>
      <text:p text:style-name="P13">Podemos realizar la comparación de desempeño como una relación entre los valores de rendimiento de los procesadores, si definimos al rendimiento como la capacidad de un sistema en realizar una tarea y calculándola como la inversa de este tiempo.</text:p>
      <text:p text:style-name="P13"><draw:frame draw:style-name="fr8" draw:name="Objeto6" text:anchor-type="char" svg:y="0.295cm" svg:width="7.83cm" svg:height="1.131cm" draw:z-index="14"><draw:object xlink:href="./Object 6" xlink:type="simple" xlink:show="embed" xlink:actuate="onLoad"/><draw:image xlink:href="./ObjectReplacements/Object 6" xlink:type="simple" xlink:show="embed" xlink:actuate="onLoad"/></draw:frame></text:p>
      <text:p text:style-name="P13"/>
      <text:p text:style-name="P2"/>
      <text:p text:style-name="P3"><text:span text:style-name="T14">Esto nos dice que el rendimiento </text:span><text:span text:style-name="T15">del Ryzen 9 5900X es aproximadamente un 15</text:span><text:span text:style-name="T16">% </text:span><text:span text:style-name="T17">mas lento que el del i5-13600K.</text:span><text:span text:style-name="T15"> </text:span></text:p>
      <text:p text:style-name="P2"/>
      <text:p text:style-name="P2">Cuando usamos un AMD Ryzen 9 7950X 16-Core, el valor de tiempo reportado para compilar el kernel de Linux es de <draw:frame draw:style-name="fr7" draw:name="Objeto5" text:anchor-type="as-char" svg:width="2.254cm" svg:height="0.534cm" draw:z-index="5"><draw:object xlink:href="./Object 5" xlink:type="simple" xlink:show="embed" xlink:actuate="onLoad"/><draw:image xlink:href="./ObjectReplacements/Object 5" xlink:type="simple" xlink:show="embed" xlink:actuate="onLoad"/></draw:frame>. <text:span text:style-name="T19">Y luego lo comparamos con el rendimiento del i5-13600K.</text:span></text:p>
      <text:p text:style-name="P2"><draw:frame draw:style-name="fr6" draw:name="Objeto7" text:anchor-type="char" svg:x="3.586cm" svg:y="0.409cm" svg:width="7.99cm" svg:height="1.131cm" draw:z-index="15"><draw:object xlink:href="./Object 7" xlink:type="simple" xlink:show="embed" xlink:actuate="onLoad"/><draw:image xlink:href="./ObjectReplacements/Object 7" xlink:type="simple" xlink:show="embed" xlink:actuate="onLoad"/><svg:desc>fórmula</svg:desc></draw:frame></text:p>
      <text:p text:style-name="P2"/>
      <text:p text:style-name="P2"/>
      <text:p text:style-name="P2"/>
      <text:p text:style-name="P14">Concluimos luego que la aceleración <text:span text:style-name="T19">con este nuevo procesador</text:span> es de un 57% mas de lo que teníamos anteriormente.</text:p>
      <text:p text:style-name="P2"/>
      <text:p text:style-name="P2"/>
      <text:p text:style-name="P16">El siguiente apartado a tratar es el de <text:span text:style-name="T20">time </text:span>profilling, donde se <text:span text:style-name="T20">analizara cuan veloz es nuestra PC para ejecutar una serie de codigos, y a partir de ello producir un perfil de datos. </text:span></text:p>
      <text:p text:style-name="P17">El primer paso es hacerse con los archivos donde se encuentra el codigo y hanilitar la creacion de perfiles durante la compilación.</text:p>
      <text:p text:style-name="P2"/>
      <text:p text:style-name="P2"><draw:frame draw:style-name="fr4" draw:name="Imagen1" text:anchor-type="char" svg:width="15cm" svg:height="2.141cm" draw:z-index="6"><draw:image xlink:href="Pictures/1000000100000333000000755E2BDDD6.png" xlink:type="simple" xlink:show="embed" xlink:actuate="onLoad" draw:mime-type="image/png"/></draw:frame></text:p>
      <text:p text:style-name="P2"/>
      <text:p text:style-name="P2"/>
      <text:p text:style-name="P17">Ejecutamos el codigo y esperamos a que finalice.</text:p>
      <text:p text:style-name="P4"/>
      <text:p text:style-name="P2"><draw:frame draw:style-name="fr2" draw:name="Imagen2" text:anchor-type="char" svg:x="0cm" svg:y="-0.046cm" svg:width="15cm" svg:height="6.172cm" draw:z-index="7"><draw:image xlink:href="Pictures/10000001000002C800000125532F032A.png" xlink:type="simple" xlink:show="embed" xlink:actuate="onLoad" draw:mime-type="image/png"/></draw:frame><text:soft-page-break/></text:p>
      <text:p text:style-name="P17">Se genera el archivo de nombre <text:span text:style-name="T9">gmon.out</text:span><text:span text:style-name="T21"> el cual debemos procesar mediante la herramienta gprof para acceder a la información, y para ello creamos el archivo </text:span><text:span text:style-name="T9">analysis,txt</text:span><text:span text:style-name="T21">.</text:span></text:p>
      <text:p text:style-name="P2"><draw:frame draw:style-name="fr2" draw:name="Imagen3" text:anchor-type="char" svg:x="0cm" svg:y="0.24cm" svg:width="15cm" svg:height="2.129cm" draw:z-index="8"><draw:image xlink:href="Pictures/100000010000032300000072946F2E8C.png" xlink:type="simple" xlink:show="embed" xlink:actuate="onLoad" draw:mime-type="image/png"/></draw:frame></text:p>
      <text:p text:style-name="P18">Luego podemos customizar la salida de <text:span text:style-name="T9">gprof</text:span><text:span text:style-name="T21"> mediante flags como </text:span><text:span text:style-name="T9">-p </text:span><text:span text:style-name="T21">o </text:span><text:span text:style-name="T9">-b</text:span><text:span text:style-name="T21">, concluyendo con una tabla donde observamos los tiempos de demora de cada una de las funciones</text:span></text:p>
      <text:p text:style-name="P2"><draw:frame draw:style-name="fr2" draw:name="Imagen5" text:anchor-type="char" svg:x="0cm" svg:y="0.286cm" svg:width="15cm" svg:height="2.092cm" draw:z-index="10"><draw:image xlink:href="Pictures/10000001000002CD000000649CE3AF84.png" xlink:type="simple" xlink:show="embed" xlink:actuate="onLoad" draw:mime-type="image/png"/></draw:frame></text:p>
      <text:p text:style-name="P2"><draw:frame draw:style-name="fr2" draw:name="Imagen4" text:anchor-type="char" svg:x="0cm" svg:y="0.065cm" svg:width="15cm" svg:height="6.135cm" draw:z-index="9"><draw:image xlink:href="Pictures/100000010000035F000001613878C9A1.png" xlink:type="simple" xlink:show="embed" xlink:actuate="onLoad" draw:mime-type="image/png"/></draw:frame></text:p>
      <text:p text:style-name="P17">El ultimo apartado a tratar, consiste en realizar un pequeño benchmark sobre un microcontrolador con el objetivo de observar la relación frecuencia-tiempo de ejecución.</text:p>
      <text:p text:style-name="P17"/>
      <text:p text:style-name="P2"><text:soft-page-break/>Realizare las pruebas y la medición con un Arduino <text:span text:style-name="T10">Pro Micro, este funciona a partir de </text:span><text:s/><text:span text:style-name="T10">un microcontrolador Atmega32u4, en condiciones normales de trabajo usamos el cristal externo de 16MHz que tiene la placa, pero este microcontrolador nos da la posibilidad de utilizar su oscilador interno de 8 MHz, debido a que es la mitad de la frecuencia podemos comparar de forma fácil los tiempos de ejecución del programa.</text:span></text:p>
      <text:p text:style-name="P2"/>
      <text:p text:style-name="P5">El código con el que realizaremos la <text:span text:style-name="T22">prueba</text:span> es el siguiente:</text:p>
      <text:p text:style-name="P5"/>
      <text:p text:style-name="P5"><draw:frame draw:style-name="fr3" draw:name="Imagen7" text:anchor-type="char" svg:width="14.506cm" svg:height="8.652cm" draw:z-index="12"><draw:image xlink:href="Pictures/1000000100000319000001D923A1DA9A.png" xlink:type="simple" xlink:show="embed" xlink:actuate="onLoad" draw:mime-type="image/png"/></draw:frame></text:p>
      <text:p text:style-name="P6">Imprime en el monitor serial cada aproximadamente un segundo, y cuenta hasta 10, para luego repetir el proceso.</text:p>
      <text:p text:style-name="P2"/>
      <text:p text:style-name="P5">En primer lugar la frecuencia de trabajo viene dada por el cristal externo de 16 MHz. Ejecutando el código, y observando las impresiones sobre el monitor serie, que viene incluida en la IDE de Arduino, podemos apreciar que el tiempo de ejecución es muy cercano a los <text:span text:style-name="T12">diez </text:span>segundos.</text:p>
      <text:p text:style-name="P5"/>
      <text:p text:style-name="P6"><draw:frame draw:style-name="fr2" draw:name="Imagen6" text:anchor-type="char" svg:x="4.313cm" svg:y="-0.011cm" svg:width="6.376cm" svg:height="5.371cm" draw:z-index="11"><draw:image xlink:href="Pictures/10000001000000F1000000CB2DF0F7C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En segundo lugar, <text:span text:style-name="T13">luego de realizar </text:span>la<text:span text:style-name="T13">s</text:span> configuracion<text:span text:style-name="T13">es</text:span> para utilizar el oscilador interno de 8 MHz, volvemos a <text:span text:style-name="T13">ejecutar</text:span> el mismo código, <text:span text:style-name="T12">donde apreciamos que a la mitad de la </text:span><text:soft-page-break/><text:span text:style-name="T12">frecuencia de reloj, demoro el doble en </text:span><text:span text:style-name="T13">finalizar concluyendo en</text:span><text:span text:style-name="T12"> alrededor de veinte segundos</text:span>.</text:p>
      <text:p text:style-name="P6"><draw:frame draw:style-name="fr1" draw:name="Imagen8" text:anchor-type="char" svg:x="4.348cm" svg:y="0.069cm" svg:width="6.304cm" svg:height="5.02cm" draw:z-index="13"><draw:image xlink:href="Pictures/1000000100000101000000CBB29D80B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12">Con esta prueba observamos claramente la relación entre la frecuencia a la que trabaja un microcontrolador y su tiempo de ejecució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AR"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AR"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text-properties style:font-name="Arial" fo:font-family="Arial" style:font-family-generic="roman" style:font-pitch="variable" fo:language="es" fo:country="ES" style:letter-kerning="false" style:font-name-asian="Arial1" style:font-family-asian="Arial" style:font-family-generic-asian="system" style:font-pitch-asian="variable" style:language-asian="es" style:country-asian="AR"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666666"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an Pablo Sanchez Busso</meta:initial-creator>
    <meta:editing-cycles>21</meta:editing-cycles>
    <meta:creation-date>2025-03-28T12:09:00</meta:creation-date>
    <dc:date>2025-03-31T19:02:00.117518261</dc:date>
    <meta:editing-duration>PT8H7M34S</meta:editing-duration>
    <meta:generator>LibreOffice/24.2.7.2$Linux_X86_64 LibreOffice_project/420$Build-2</meta:generator>
    <meta:document-statistic meta:table-count="2" meta:image-count="9" meta:object-count="7" meta:page-count="6" meta:paragraph-count="47" meta:word-count="943" meta:character-count="5687" meta:non-whitespace-character-count="4782"/>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n>5.1</mn>
      <mi mathvariant="italic">GHz</mi>
    </mrow>
    <annotation encoding="StarMath 5.0">5.1GHz</annotation>
  </semantics>
</math>
</file>

<file path=Object 2/content.xml><?xml version="1.0" encoding="utf-8"?>
<math xmlns="http://www.w3.org/1998/Math/MathML" display="block">
  <semantics>
    <mrow>
      <mrow>
        <msub>
          <mi>t</mi>
          <mi>c</mi>
        </msub>
        <mo stretchy="false">=</mo>
        <mn>83</mn>
      </mrow>
      <mi>±</mi>
      <mn>3</mn>
      <mi mathvariant="italic">seg</mi>
    </mrow>
    <annotation encoding="StarMath 5.0">{t} rsub {c} =83±3 seg</annotation>
  </semantics>
</math>
</file>

<file path=Object 3/content.xml><?xml version="1.0" encoding="utf-8"?>
<math xmlns="http://www.w3.org/1998/Math/MathML" display="block">
  <semantics>
    <mrow>
      <mn>3.7</mn>
      <mi mathvariant="italic">GHz</mi>
    </mrow>
    <annotation encoding="StarMath 5.0">3.7GHz</annotation>
  </semantics>
</math>
</file>

<file path=Object 4/content.xml><?xml version="1.0" encoding="utf-8"?>
<math xmlns="http://www.w3.org/1998/Math/MathML" display="block">
  <semantics>
    <mrow>
      <mrow>
        <msub>
          <mi>t</mi>
          <mi>c</mi>
        </msub>
        <mo stretchy="false">=</mo>
        <mn>97</mn>
      </mrow>
      <mi>±</mi>
      <mn>6</mn>
      <mi mathvariant="italic">seg</mi>
    </mrow>
    <annotation encoding="StarMath 5.0">{t} rsub {c} =97 ±6 seg</annotation>
  </semantics>
</math>
</file>

<file path=Object 5/content.xml><?xml version="1.0" encoding="utf-8"?>
<math xmlns="http://www.w3.org/1998/Math/MathML" display="block">
  <semantics>
    <mrow>
      <mrow>
        <msub>
          <mi>t</mi>
          <mi>c</mi>
        </msub>
        <mo stretchy="false">=</mo>
        <mn>53</mn>
      </mrow>
      <mi>±</mi>
      <mn>3</mn>
      <mi mathvariant="italic">seg</mi>
    </mrow>
    <annotation encoding="StarMath 5.0">{t} rsub {c} =53±3 seg</annotation>
  </semantics>
</math>
</file>

<file path=Object 6/content.xml><?xml version="1.0" encoding="utf-8"?>
<math xmlns="http://www.w3.org/1998/Math/MathML" display="block">
  <semantics>
    <mrow>
      <mrow>
        <mfrac>
          <msub>
            <mi mathvariant="italic">Rendimiento</mi>
            <mrow>
              <mi>i</mi>
              <mn>5</mn>
            </mrow>
          </msub>
          <msub>
            <mi mathvariant="italic">Rendimiento</mi>
            <mi mathvariant="italic">Ryzen</mi>
          </msub>
        </mfrac>
        <mo stretchy="false">=</mo>
        <mfrac>
          <msub>
            <mi mathvariant="italic">EXtime</mi>
            <mi mathvariant="italic">Ryzen</mi>
          </msub>
          <msub>
            <mi mathvariant="italic">EXtime</mi>
            <mrow>
              <mi>i</mi>
              <mn>5</mn>
            </mrow>
          </msub>
        </mfrac>
        <mo stretchy="false">=</mo>
        <mfrac>
          <mrow>
            <mn>97</mn>
            <mi>±</mi>
            <mn>6</mn>
          </mrow>
          <mrow>
            <mn>83</mn>
            <mi>±</mi>
            <mn>3</mn>
          </mrow>
        </mfrac>
        <mo stretchy="false">=</mo>
        <mn>1</mn>
      </mrow>
      <mn>,17</mn>
    </mrow>
    <annotation encoding="StarMath 5.0">{Rendimiento_i5}over {Rendimiento_Ryzen} = {EXtime_Ryzen} over {EXtime_i5}= {97±6} over {83±3}= 1,17
  </annotation>
  </semantics>
</math>
</file>

<file path=Object 7/content.xml><?xml version="1.0" encoding="utf-8"?>
<math xmlns="http://www.w3.org/1998/Math/MathML" display="block">
  <semantics>
    <mrow>
      <mrow>
        <mfrac>
          <msub>
            <mi mathvariant="italic">Rendimiento</mi>
            <mrow>
              <mn>7950</mn>
              <mi>x</mi>
            </mrow>
          </msub>
          <msub>
            <mi mathvariant="italic">Rendimiento</mi>
            <mrow>
              <mi>i</mi>
              <mn>5</mn>
            </mrow>
          </msub>
        </mfrac>
        <mo stretchy="false">=</mo>
        <mfrac>
          <msub>
            <mi mathvariant="italic">EXtime</mi>
            <mrow>
              <mi>i</mi>
              <mn>5</mn>
            </mrow>
          </msub>
          <msub>
            <mi mathvariant="italic">EXtime</mi>
            <mrow>
              <mn>7950</mn>
              <mi>X</mi>
            </mrow>
          </msub>
        </mfrac>
        <mo stretchy="false">=</mo>
        <mfrac>
          <mrow>
            <mn>83</mn>
            <mi>±</mi>
            <mn>3</mn>
          </mrow>
          <mrow>
            <mn>53</mn>
            <mi>±</mi>
            <mn>3</mn>
          </mrow>
        </mfrac>
        <mo stretchy="false">=</mo>
        <mn>1</mn>
      </mrow>
      <mn>,57</mn>
    </mrow>
    <annotation encoding="StarMath 5.0">{Rendimiento_7950x}over {Rendimiento_i5} = {EXtime_i5} over {EXtime_7950X}= {83±3} over {53±3}=1,57
  </annotation>
  </semantics>
</math>
</file>